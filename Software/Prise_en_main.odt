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0D000000C3014855C6.png" manifest:media-type="image/png"/>
  <manifest:file-entry manifest:full-path="Pictures/10000001000000EF000000ED6AF22C41.png" manifest:media-type="image/png"/>
  <manifest:file-entry manifest:full-path="Pictures/1000000100000779000004067804F7C8.png" manifest:media-type="image/png"/>
  <manifest:file-entry manifest:full-path="Pictures/100000010000077F000004767F71CFC0.png" manifest:media-type="image/png"/>
  <manifest:file-entry manifest:full-path="Pictures/100000010000077F0000046C2AD0BC17.png" manifest:media-type="image/png"/>
  <manifest:file-entry manifest:full-path="Pictures/1000000100000722000003F8BF49D530.png" manifest:media-type="image/png"/>
  <manifest:file-entry manifest:full-path="Pictures/100000010000077F0000046CEA2E1904.png" manifest:media-type="image/png"/>
  <manifest:file-entry manifest:full-path="Pictures/10000001000004C4000003F1234120B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e06e" officeooo:paragraph-rsid="0000e06e"/>
    </style:style>
    <style:style style:name="P2" style:family="paragraph" style:parent-style-name="Standard">
      <style:text-properties officeooo:rsid="0002391a" officeooo:paragraph-rsid="0002391a"/>
    </style:style>
    <style:style style:name="P3" style:family="paragraph" style:parent-style-name="Standard">
      <style:text-properties officeooo:rsid="00033904" officeooo:paragraph-rsid="00033904"/>
    </style:style>
    <style:style style:name="P4" style:family="paragraph" style:parent-style-name="Standard">
      <style:text-properties officeooo:rsid="00046da5" officeooo:paragraph-rsid="00046da5"/>
    </style:style>
    <style:style style:name="P5" style:family="paragraph" style:parent-style-name="Standard">
      <style:text-properties officeooo:rsid="0006e163" officeooo:paragraph-rsid="0006e163"/>
    </style:style>
    <style:style style:name="P6" style:family="paragraph" style:parent-style-name="Standard">
      <style:paragraph-properties fo:text-align="center" style:justify-single-word="false"/>
      <style:text-properties fo:font-size="14pt" officeooo:rsid="00084aef" officeooo:paragraph-rsid="00084aef" style:font-size-asian="14pt" style:font-size-complex="14pt"/>
    </style:style>
    <style:style style:name="T1" style:family="text">
      <style:text-properties officeooo:rsid="0002391a"/>
    </style:style>
    <style:style style:name="T2" style:family="text">
      <style:text-properties officeooo:rsid="00084aef"/>
    </style:style>
    <style:style style:name="T3" style:family="text">
      <style:text-properties fo:font-style="italic" officeooo:rsid="00084aef" style:font-style-asian="italic" style:font-style-complex="italic"/>
    </style:style>
    <style:style style:name="T4" style:family="text">
      <style:text-properties fo:font-style="normal" officeooo:rsid="00084aef" style:font-style-asian="normal" style:font-style-complex="normal"/>
    </style:style>
    <style:style style:name="T5" style:family="text">
      <style:text-properties officeooo:rsid="00033904"/>
    </style:style>
    <style:style style:name="T6" style:family="text">
      <style:text-properties officeooo:rsid="00046da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115cm" svg:y="-0.026cm" svg:width="6.638cm" svg:height="6.583cm" draw:z-index="0"><draw:image xlink:href="Pictures/10000001000000EF000000ED6AF22C41.png" xlink:type="simple" xlink:show="embed" xlink:actuate="onLoad" draw:mime-type="image/png"/></draw:frame>On lance d’abord motorControl Workbench &gt; <text:span text:style-name="T1">Load</text:span> project <text:span text:style-name="T1">là vous mettez le fichier BON_MOTEUR.stwb6 </text:span><text:span text:style-name="T2">(dispo dans le dossier </text:span><text:span text:style-name="T3">Fichier pour load les projects</text:span><text:span text:style-name="T4">)</text:span><text:span text:style-name="T1">. Et ça vous ouvre directement la page(Image ci-dessous).</text:span></text:p>
      <text:p text:style-name="P2"><draw:frame draw:style-name="fr2" draw:name="Image2" text:anchor-type="char" svg:width="17cm" svg:height="10.123cm" draw:z-index="1"><draw:image xlink:href="Pictures/100000010000077F000004767F71CFC0.png" xlink:type="simple" xlink:show="embed" xlink:actuate="onLoad" draw:mime-type="image/png"/></draw:frame>A gauche vous avez les paramètres que vous pouvez modifier etc.</text:p>
      <text:p text:style-name="P2">Pour lancer motor Pilot il faut Generate the Project :</text:p>
      <text:p text:style-name="P2"><draw:frame draw:style-name="fr3" draw:name="Image3" text:anchor-type="char" svg:x="0.691cm" svg:y="0.261cm" svg:width="11.441cm" svg:height="6.089cm" draw:z-index="2"><draw:image xlink:href="Pictures/100000010000077F0000046C2AD0BC17.png" xlink:type="simple" xlink:show="embed" xlink:actuate="onLoad" draw:mime-type="image/png"/></draw:frame>Cliquer sur generate ça le genére (si vous voyez des lignes orange pas d’inquiétude)</text:p>
      <text:p text:style-name="P2">Une fois la génération finit, il vous suffit d’appuyer sur Run STM32CubeMx.</text:p>
      <text:p text:style-name="P2"/>
      <text:p text:style-name="P2">A ce stade normalement, un page STM32CubeMx se <text:soft-page-break/>lance appuyer sur Generate the code. Ensuite, appuyer sur ouvrez un fichier c de la barre à gauche et appuyez sur RUN.</text:p>
      <text:p text:style-name="P2"/>
      <text:p text:style-name="P2">Pendant ce temps vous pouvez lancer motorpilot via motor Control workbench (bouton à coter de Generate the project).</text:p>
      <text:p text:style-name="P2"/>
      <text:p text:style-name="P2">Remarque, l’application qui se lancera va dépendre de ce que vous avez cocher <text:span text:style-name="T5">dans Application Configuration. Ex :</text:span></text:p>
      <text:p text:style-name="P3"><draw:frame draw:style-name="fr4" draw:name="Image4" text:anchor-type="char" svg:width="17cm" svg:height="9.458cm" draw:z-index="3"><draw:image xlink:href="Pictures/1000000100000722000003F8BF49D530.png" xlink:type="simple" xlink:show="embed" xlink:actuate="onLoad" draw:mime-type="image/png"/></draw:frame>Dans tous les cas, ceci est la page de base:</text:p>
      <text:p text:style-name="P3"><draw:frame draw:style-name="fr3" draw:name="Image5" text:anchor-type="char" svg:x="0.288cm" svg:y="0.215cm" svg:width="17cm" svg:height="10.029cm" draw:z-index="4"><draw:image xlink:href="Pictures/100000010000077F0000046CEA2E1904.png" xlink:type="simple" xlink:show="embed" xlink:actuate="onLoad" draw:mime-type="image/png"/></draw:frame></text:p>
      <text:p text:style-name="P3"><draw:frame draw:style-name="fr1" draw:name="Image8" text:anchor-type="char" svg:x="0.21cm" svg:y="0.079cm" svg:width="7.117cm" svg:height="5.159cm" draw:z-index="7"><draw:image xlink:href="Pictures/100000010000010D000000C3014855C6.png" xlink:type="simple" xlink:show="embed" xlink:actuate="onLoad" draw:mime-type="image/png"/></draw:frame><text:soft-page-break/><text:span text:style-name="T6">Vous pouvez aussi tout contrôler en haut à gauche avec GUI. Enfin, s</text:span>i vous choisissez Load UI <text:span text:style-name="T6">il faut choisir </text:span>le <text:span text:style-name="T6">fichier </text:span>MC_FOC_SDK pour avoir <text:span text:style-name="T6">l’interface suivante</text:span> et contrôler <text:span text:style-name="T6">le moteur</text:span>:</text:p>
      <text:p text:style-name="P3"><draw:frame draw:style-name="fr4" draw:name="Image6" text:anchor-type="char" svg:width="17cm" svg:height="9.156cm" draw:z-index="5"><draw:image xlink:href="Pictures/1000000100000779000004067804F7C8.png" xlink:type="simple" xlink:show="embed" xlink:actuate="onLoad" draw:mime-type="image/png"/></draw:frame>Dans l’onglet Control vous pouvez choisir de le contrôler en Torque ou en Speed.</text:p>
      <text:p text:style-name="P3">Si jamais vous avez un problème de over cu<text:span text:style-name="T6">r</text:span>rent, <text:span text:style-name="T6">il faut régler le problème ici :</text:span></text:p>
      <text:p text:style-name="P4"><draw:frame draw:style-name="fr5" draw:name="Image7" text:anchor-type="char" svg:width="15.683cm" svg:height="12.97cm" draw:z-index="6"><draw:image xlink:href="Pictures/10000001000004C4000003F1234120B5.png" xlink:type="simple" xlink:show="embed" xlink:actuate="onLoad" draw:mime-type="image/png"/></draw:frame><text:soft-page-break/>Dans Digital Filter Duration, il faut augmenter le temps ici j’ai mis 282.35 ns.</text:p>
      <text:p text:style-name="P4"/>
      <text:p text:style-name="P4">REMARQUE IMPORTANTE : IL FAUT à CHAQUE FOIS RE-GENERATE the project &gt; Run STM32CubeMx &gt; Generate the code &gt; Run un fichier C POUR CHAQUE CHANGEMENT QUE VOUS FAITES DANS LE SOFTWARE MC WORKBENCH. (En tout cas c’est la seule façon avec laquelle on arrivait à faire en sorte que les changements dans le software soit pris en compte si jamais vous trouvez une autre méthode plus court, bien joué).</text:p>
      <text:p text:style-name="P4"/>
      <text:p text:style-name="P5">J’ai fournit les fichier JSON obtenu via MOTOR Profiler<text:span text:style-name="T2">( dans le dossier </text:span><text:span text:style-name="T3">Fichier pour load les projects</text:span><text:span text:style-name="T4">, vous remarquerez qu’il y en a deux, celui « Moteur présentation » c’est le fichier que l’on a utiliser pour la présentation de S7, et l’autre c’est celui qu’on a utilisé pour les applications présentées plus hauts)</text:span>. Libre à vous de tester et d’observer les mesures. Ce software permet d’identifier les « composants » et leurs valeurs du moteur et faute de datasheet sur les moteurs commandées, on a du faire avec les moyens du bord.</text:p>
      <text:p text:style-name="P3"/>
      <text:p text:style-name="P6">BON COURAGE (il vous en faudra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9T16:00:33.246057800</meta:creation-date>
    <dc:date>2026-04-25T17:57:51.270601300</dc:date>
    <meta:editing-duration>PT11M36S</meta:editing-duration>
    <meta:editing-cycles>5</meta:editing-cycles>
    <meta:generator>LibreOffice/25.8.5.2$Windows_X86_64 LibreOffice_project/9c8b85f387cc00a89945a79c9e6239f32e450ac2</meta:generator>
    <meta:document-statistic meta:table-count="0" meta:image-count="8" meta:object-count="0" meta:page-count="4" meta:paragraph-count="16" meta:word-count="398" meta:character-count="2314" meta:non-whitespace-character-count="1932"/>
  </office:meta>
</office:document-meta>
</file>